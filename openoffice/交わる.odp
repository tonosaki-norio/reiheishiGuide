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10000006EC381560B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2323d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25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493cm" svg:height="20.999cm" svg:x="0.205cm" svg:y="-0.485cm">
          <draw:image xlink:href="Pictures/1000020100000910000006EC381560B0.png" xlink:type="simple" xlink:show="embed" xlink:actuate="onLoad">
            <text:p/>
          </draw:image>
        </draw:frame>
        <draw:line draw:style-name="gr2" draw:text-style-name="P1" draw:layer="layout" svg:x1="9cm" svg:y1="13.8cm" svg:x2="14cm" svg:y2="14.4cm">
          <text:p/>
        </draw:line>
        <draw:line draw:style-name="gr3" draw:text-style-name="P1" draw:layer="layout" svg:x1="13.1cm" svg:y1="18.2cm" svg:x2="12.3cm" svg:y2="11.4cm">
          <text:p/>
        </draw:line>
        <draw:custom-shape draw:style-name="gr4" draw:text-style-name="P1" draw:layer="layout" svg:width="1.4cm" svg:height="1cm" svg:x="12cm" svg:y="13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2" draw:layer="layout" svg:width="2.758cm" svg:height="1.381cm" svg:x="5.042cm" svg:y="14.223cm">
          <draw:text-box>
            <text:p><text:span text:style-name="T1">京都</text:span></text:p>
          </draw:text-box>
        </draw:frame>
        <draw:frame draw:style-name="gr5" draw:text-style-name="P2" draw:layer="layout" svg:width="2.758cm" svg:height="1.381cm" svg:x="17.228cm" svg:y="14.8cm">
          <draw:text-box>
            <text:p><text:span text:style-name="T1">日光</text:span></text:p>
          </draw:text-box>
        </draw:frame>
        <draw:frame draw:style-name="gr5" draw:text-style-name="P2" draw:layer="layout" svg:width="2.758cm" svg:height="1.381cm" svg:x="11.4cm" svg:y="18.314cm">
          <draw:text-box>
            <text:p><text:span text:style-name="T1">東京</text:span></text:p>
          </draw:text-box>
        </draw:frame>
        <draw:frame draw:style-name="gr5" draw:text-style-name="P2" draw:layer="layout" svg:width="2.758cm" svg:height="1.381cm" svg:x="12.628cm" svg:y="10.2cm">
          <draw:text-box>
            <text:p><text:span text:style-name="T1">新潟</text:span></text:p>
          </draw:text-box>
        </draw:frame>
        <draw:custom-shape draw:style-name="gr6" draw:text-style-name="P1" draw:layer="layout" svg:width="6cm" svg:height="2.8cm" draw:transform="skewX (0.006108652381979) rotate (0.006108652381979) translate (5.6cm 15.537cm)">
          <text:p text:style-name="P1">川の道戦士は南から</text:p>
          <text:p text:style-name="P1">主に左側歩道で来る</text:p>
          <text:p text:style-name="P1">三日目が</text:p>
          <text:p text:style-name="P1">ボリュームゾーン</text:p>
          <draw:enhanced-geometry svg:viewBox="0 0 21600 21600" draw:text-areas="800 800 20800 20800" draw:type="round-rectangular-callout" draw:modifiers="25023.0294950842 -7588.14709032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0.6cm" svg:height="0.001cm" svg:x="10.6cm" svg:y="17.4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2cm" svg:height="2cm" svg:x="23.2cm" svg:y="9.4cm">
          <text:p text:style-name="P1">CP50</text:p>
          <text:p text:style-name="P1">岩村田宿</text:p>
          <draw:enhanced-geometry svg:viewBox="0 0 21600 21600" draw:text-areas="800 800 20800 20800" draw:type="round-rectangular-callout" draw:modifiers="27470.6654170572 38871.3643178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Mincho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OSAKI Norio</meta:initial-creator>
    <meta:creation-date>2024-06-30T20:48:46</meta:creation-date>
    <meta:editing-duration>P5DT23H52M31S</meta:editing-duration>
    <meta:editing-cycles>5</meta:editing-cycles>
    <dc:date>2025-01-24T08:43:06</dc:date>
    <dc:creator>TONOSAKI Norio</dc:creator>
    <meta:generator>OpenOffice/4.1.15$Unix OpenOffice.org_project/4115m2$Build-9813</meta:generator>
    <meta:document-statistic meta:object-count="34"/>
  </office:meta>
</office:document-meta>
</file>